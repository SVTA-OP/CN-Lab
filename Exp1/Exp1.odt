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A000000FA351DB8B58B211E42.png" manifest:media-type="image/png"/>
  <manifest:file-entry manifest:full-path="Pictures/10000001000002B0000001C448F19DD0D82A6C9F.png" manifest:media-type="image/png"/>
  <manifest:file-entry manifest:full-path="Pictures/10000001000002BD000001C09F389A7EE6F60247.png" manifest:media-type="image/png"/>
  <manifest:file-entry manifest:full-path="Pictures/10000001000002AC000001C075C1816F31D8C213.png" manifest:media-type="image/png"/>
  <manifest:file-entry manifest:full-path="Pictures/10000001000002AC000001C035A4946A5206A0D3.png" manifest:media-type="image/png"/>
  <manifest:file-entry manifest:full-path="Pictures/10000001000002670000010D85AA0FBD60FF7A74.png" manifest:media-type="image/png"/>
  <manifest:file-entry manifest:full-path="Pictures/10000001000002AC000001C0512A5608BBF86B2F.png" manifest:media-type="image/png"/>
  <manifest:file-entry manifest:full-path="Pictures/10000001000002B0000001C4BBFD6E7037A1AD37.png" manifest:media-type="image/png"/>
  <manifest:file-entry manifest:full-path="Pictures/10000001000002BD000001C0D86B0BA95FE95699.png" manifest:media-type="image/png"/>
  <manifest:file-entry manifest:full-path="Pictures/10000001000002BD000001C04C672F81BA993C27.png" manifest:media-type="image/png"/>
  <manifest:file-entry manifest:full-path="Pictures/1000000100000379000001395D681CE0CB257B4A.png" manifest:media-type="image/png"/>
  <manifest:file-entry manifest:full-path="Pictures/10000001000002C4000002112FACBE3E875425B5.png" manifest:media-type="image/png"/>
  <manifest:file-entry manifest:full-path="Pictures/100000010000053A000001F5E24C62D7B085F6C0.png" manifest:media-type="image/png"/>
  <manifest:file-entry manifest:full-path="Pictures/100000010000032F00000284B40672328E841FA1.png" manifest:media-type="image/png"/>
  <manifest:file-entry manifest:full-path="Pictures/10000001000002C5000001B39F98B06D4BA5907E.png" manifest:media-type="image/png"/>
  <manifest:file-entry manifest:full-path="Pictures/10000001000002F800000219BC8511CBC7F4410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start" style:justify-single-word="false"/>
      <style:text-properties fo:font-size="14pt" fo:font-weight="bold" officeooo:rsid="0005c8fa" officeooo:paragraph-rsid="0005c8fa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5c8fa" officeooo:paragraph-rsid="0005c8fa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7ef80" officeooo:paragraph-rsid="0007ef80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5c8fa" officeooo:paragraph-rsid="0005c8fa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3f839" officeooo:paragraph-rsid="0003f83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0pt" fo:font-weight="bold" officeooo:rsid="0005c8fa" officeooo:paragraph-rsid="0005c8fa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a7aa4" officeooo:paragraph-rsid="000a7aa4" style:font-weight-asian="bold" style:font-weight-complex="bold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5">
      <style:text-properties officeooo:paragraph-rsid="0008537a"/>
    </style:style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Text_20_body" style:list-style-name="L8"/>
    <style:style style:name="P17" style:family="paragraph" style:parent-style-name="Text_20_body" style:list-style-name="L9"/>
    <style:style style:name="P18" style:family="paragraph" style:parent-style-name="Text_20_body" style:list-style-name="L9">
      <style:text-properties officeooo:paragraph-rsid="0008537a"/>
    </style:style>
    <style:style style:name="P19" style:family="paragraph" style:parent-style-name="Text_20_body">
      <style:text-properties fo:font-size="14pt" fo:font-weight="bold" officeooo:rsid="0005c8fa" officeooo:paragraph-rsid="0008537a" style:font-size-asian="12.25pt" style:font-weight-asian="bold" style:font-size-complex="14pt" style:font-weight-complex="bold"/>
    </style:style>
    <style:style style:name="P20" style:family="paragraph" style:parent-style-name="Text_20_body" style:list-style-name="L10"/>
    <style:style style:name="P21" style:family="paragraph" style:parent-style-name="Text_20_body" style:list-style-name="L11"/>
    <style:style style:name="P22" style:family="paragraph" style:parent-style-name="Text_20_body" style:list-style-name="L12"/>
    <style:style style:name="P23" style:family="paragraph" style:parent-style-name="Text_20_body" style:list-style-name="L13"/>
    <style:style style:name="P24" style:family="paragraph" style:parent-style-name="Text_20_body" style:list-style-name="L14"/>
    <style:style style:name="T1" style:family="text">
      <style:text-properties officeooo:rsid="0007ef80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b01c7"/>
    </style:style>
    <style:style style:name="T5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SN College of Engineering – Kalavakkam</text:p>
      <text:p text:style-name="P7">Computer Science and Engineering</text:p>
      <text:p text:style-name="P5">ICS1513 – Computer Networks Laboratory</text:p>
      <text:p text:style-name="P5"/>
      <text:p text:style-name="P5">Experiement 1 – <text:span text:style-name="T1">Analysing network diagnostic tools</text:span></text:p>
      <text:p text:style-name="P5"/>
      <text:p text:style-name="P6">Saravana Senthilkumar – 3122247001057<text:tab/><text:tab/><text:tab/><text:tab/><text:tab/><text:tab/><text:tab/><text:tab/>25.06.202<text:span text:style-name="T4">6<text:tab/></text:span></text:p>
      <text:p text:style-name="P6"/>
      <text:p text:style-name="P6"/>
      <text:p text:style-name="P2">1a. Apply and analyze the use of various networking diagnostic and monitoring tools in a computer network environment. Demonstrate the execution of the following tools and record your observations regarding network status, configuration, connectivity, routing, and performance:</text:p>
      <text:p text:style-name="P4"/>
      <text:p text:style-name="P4"/>
      <text:p text:style-name="P2">• netstat</text:p>
      <text:p text:style-name="P3"><draw:frame draw:style-name="fr3" draw:name="Image1" text:anchor-type="char" svg:width="17cm" svg:height="10.43cm" draw:z-index="0"><draw:image xlink:href="Pictures/10000001000002C5000001B39F98B06D4BA5907E.png" xlink:type="simple" xlink:show="embed" xlink:actuate="onLoad" draw:mime-type="image/png"/></draw:frame></text:p>
      <text:p text:style-name="P4">netstat (Network Statistics)</text:p>
      <text:p text:style-name="P4"/>
      <text:p text:style-name="P4"><text:s text:c="4"/><text:span text:style-name="T3">Purpose:</text:span> Displays active network connections, routing tables, and interface statistics.</text:p>
      <text:p text:style-name="P4"/>
      <text:p text:style-name="P4"><text:s text:c="4"/><text:span text:style-name="T3">Observation Focus: </text:span>The -tuln flags show listening (l) TCP (t) and UDP (u) ports numerically (n). Look for 0.0.0.0:XX or :::XX, which indicates services on your local machine actively waiting for incoming network connections.</text:p>
      <text:p text:style-name="P2"/>
      <text:p text:style-name="P2"/>
      <text:p text:style-name="P2"/>
      <text:p text:style-name="P2"><text:soft-page-break/></text:p>
      <text:p text:style-name="P2"/>
      <text:p text:style-name="P2">• ifconfig</text:p>
      <text:p text:style-name="P2"><draw:frame draw:style-name="fr1" draw:name="Image2" text:anchor-type="char" svg:width="17cm" svg:height="11.134cm" draw:z-index="1"><draw:image xlink:href="Pictures/10000001000002AC000001C075C1816F31D8C213.png" xlink:type="simple" xlink:show="embed" xlink:actuate="onLoad" draw:mime-type="image/png"/></draw:frame><text:s/></text:p>
      <text:p text:style-name="P4">ifconfig (Interface Configuration)</text:p>
      <text:p text:style-name="P4"/>
      <text:p text:style-name="P4"><text:s text:c="4"/><text:span text:style-name="T3">Purpose:</text:span> Displays or configures network interface parameters.</text:p>
      <text:p text:style-name="P4"/>
      <text:p text:style-name="P4"><text:s text:c="4"/><text:span text:style-name="T3">Observation Focus:</text:span> Identifies active network cards (eth0, wlan0, lo). Note the inet address (your local IPv4 address), netmask, and RX/TX packets to verify that data is actively being sent and received.</text:p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• iwconfig</text:p>
      <text:p text:style-name="P2"><draw:frame draw:style-name="fr1" draw:name="Image3" text:anchor-type="char" svg:width="17cm" svg:height="11.134cm" draw:z-index="2"><draw:image xlink:href="Pictures/10000001000002AC000001C035A4946A5206A0D3.png" xlink:type="simple" xlink:show="embed" xlink:actuate="onLoad" draw:mime-type="image/png"/></draw:frame></text:p>
      <text:h text:style-name="P1" text:outline-level="3"><text:span text:style-name="Source_20_Text">iwconfig</text:span> (Wireless Interface Configuration)</text:h>
      <text:list xml:id="list2754778417" text:style-name="L1">
        <text:list-item>
          <text:p text:style-name="P8"><text:span text:style-name="T2">Purpose:</text:span> Dedicated specifically to wireless network interfaces.</text:p>
        </text:list-item>
        <text:list-item>
          <text:p text:style-name="P8"><text:span text:style-name="T2">Observation Focus:</text:span> If you are on Wi-Fi, it reveals the <text:span text:style-name="T2">SSID</text:span> (network name), link quality, signal strength (in dBm), and data bit rate. If you are on a wired VM, it will say "no wireless extensions"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• ping</text:p>
      <text:p text:style-name="P2"/>
      <text:p text:style-name="P2"><draw:frame draw:style-name="fr1" draw:name="Image4" text:anchor-type="char" svg:width="17cm" svg:height="11.134cm" draw:z-index="3"><draw:image xlink:href="Pictures/10000001000002AC000001C0512A5608BBF86B2F.png" xlink:type="simple" xlink:show="embed" xlink:actuate="onLoad" draw:mime-type="image/png"/></draw:frame><text:s/></text:p>
      <text:h text:style-name="P1" text:outline-level="3"><text:span text:style-name="Source_20_Text">ping</text:span> (Packet InterNet Groper)</text:h>
      <text:list xml:id="list3198810054" text:style-name="L2">
        <text:list-item>
          <text:p text:style-name="P9"><text:span text:style-name="T2">Purpose:</text:span> Tests reachability of a host across an IP network and measures round-trip time.</text:p>
        </text:list-item>
        <text:list-item>
          <text:p text:style-name="P9"><text:span text:style-name="T2">Observation Focus:</text:span> Look at the <text:span text:style-name="T2">time=XX ms</text:span> value; lower values mean lower latency. Check the <text:span text:style-name="T2">packet loss percentage</text:span> at the bottom; 0% loss confirms a highly stable, working connection to the target server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• route</text:p>
      <text:p text:style-name="P2"><draw:frame draw:style-name="fr1" draw:name="Image5" text:anchor-type="char" svg:width="17cm" svg:height="10.864cm" draw:z-index="4"><draw:image xlink:href="Pictures/10000001000002BD000001C09F389A7EE6F60247.png" xlink:type="simple" xlink:show="embed" xlink:actuate="onLoad" draw:mime-type="image/png"/></draw:frame></text:p>
      <text:h text:style-name="P1" text:outline-level="3"><text:span text:style-name="Source_20_Text">route</text:span> (Routing Table)</text:h>
      <text:list xml:id="list1195251341" text:style-name="L3">
        <text:list-item>
          <text:p text:style-name="P10"><text:span text:style-name="T2">Purpose:</text:span> Displays and manipulates the IP routing table.</text:p>
        </text:list-item>
        <text:list-item>
          <text:p text:style-name="P10"><text:span text:style-name="T2">Observation Focus:</text:span> Look for the destination <text:span text:style-name="Source_20_Text">0.0.0.0</text:span> with the <text:span text:style-name="Source_20_Text">G</text:span> (Gateway) flag. This row displays your <text:span text:style-name="T2">Default Gateway</text:span> (typically your local router's IP), which is the exit point your traffic uses to reach the broader internet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• nmap</text:p>
      <text:p text:style-name="P2"/>
      <text:p text:style-name="P2"><draw:frame draw:style-name="fr1" draw:name="Image6" text:anchor-type="char" svg:width="17cm" svg:height="10.864cm" draw:z-index="5"><draw:image xlink:href="Pictures/10000001000002BD000001C0D86B0BA95FE95699.png" xlink:type="simple" xlink:show="embed" xlink:actuate="onLoad" draw:mime-type="image/png"/></draw:frame><text:s/></text:p>
      <text:h text:style-name="P1" text:outline-level="3"><text:span text:style-name="Source_20_Text">nmap</text:span> (Network Mapper)</text:h>
      <text:list xml:id="list4159141312" text:style-name="L4">
        <text:list-item>
          <text:p text:style-name="P11"><text:span text:style-name="T2">Purpose:</text:span> Network exploration tool and security/port scanner.</text:p>
        </text:list-item>
        <text:list-item>
          <text:p text:style-name="P11"><text:span text:style-name="T2">Observation Focus:</text:span> The output displays a list of open ports on the target machine (<text:span text:style-name="Source_20_Text">localhost</text:span>). It tells you which services (like SSH, HTTP, or RPC) are actively running and exposed on that machine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• tcpdump</text:p>
      <text:p text:style-name="P2"><draw:frame draw:style-name="fr1" draw:name="Image7" text:anchor-type="char" svg:width="17cm" svg:height="10.864cm" draw:z-index="6"><draw:image xlink:href="Pictures/10000001000002BD000001C04C672F81BA993C27.png" xlink:type="simple" xlink:show="embed" xlink:actuate="onLoad" draw:mime-type="image/png"/></draw:frame></text:p>
      <text:h text:style-name="P1" text:outline-level="3"><text:span text:style-name="Source_20_Text">tcpdump</text:span> (Command-line Packet Analyzer)</text:h>
      <text:list xml:id="list2326895181" text:style-name="L5">
        <text:list-item>
          <text:p text:style-name="P12"><text:span text:style-name="T2">Purpose:</text:span> Captures and displays network packets flowing through an interface in real-time.</text:p>
        </text:list-item>
        <text:list-item>
          <text:p text:style-name="P13"><text:span text:style-name="T2">Observation Focus:</text:span> Each line represents a packet. Observe the timestamps, source IP/port, destination IP/port, and protocol flags (like <text:span text:style-name="Source_20_Text">[S]</text:span> for SYN or <text:span text:style-name="Source_20_Text">[.]</text:span> for ACK), showcasing the underlying handshake mechanics of network traffic.</text:p>
        </text:list-item>
      </text:list>
      <text:p text:style-name="P2"><draw:frame draw:style-name="fr2" draw:name="Image8" text:anchor-type="char" svg:x="0.122cm" svg:y="0.614cm" svg:width="15.064cm" svg:height="11.051cm" draw:z-index="7"><draw:image xlink:href="Pictures/10000001000002C4000002112FACBE3E875425B5.png" xlink:type="simple" xlink:show="embed" xlink:actuate="onLoad" draw:mime-type="image/png"/></draw:frame>• dig</text:p>
      <text:p text:style-name="P2"><text:soft-page-break/><text:s/></text:p>
      <text:h text:style-name="P1" text:outline-level="3"><text:span text:style-name="Source_20_Text">dig</text:span> (Domain Information Groper)</text:h>
      <text:list xml:id="list3954188151" text:style-name="L6">
        <text:list-item>
          <text:p text:style-name="P14"><text:span text:style-name="T2">Purpose:</text:span> A flexible tool for interrogating DNS name servers.</text:p>
        </text:list-item>
        <text:list-item>
          <text:p text:style-name="P14"><text:span text:style-name="T2">Observation Focus:</text:span> Look at the <text:span text:style-name="T2">ANSWER SECTION</text:span>. It shows the mapping of a human-readable domain name to its direct public IPv4 address, along with the TTL (Time to Live) value.</text:p>
        </text:list-item>
      </text:list>
      <text:p text:style-name="P2">• traceroute</text:p>
      <text:p text:style-name="P2"><draw:frame draw:style-name="fr1" draw:name="Image9" text:anchor-type="char" svg:width="17cm" svg:height="6.364cm" draw:z-index="8"><draw:image xlink:href="Pictures/100000010000053A000001F5E24C62D7B085F6C0.png" xlink:type="simple" xlink:show="embed" xlink:actuate="onLoad" draw:mime-type="image/png"/></draw:frame><text:s/></text:p>
      <text:h text:style-name="P1" text:outline-level="3"><text:span text:style-name="Source_20_Text">traceroute</text:span> (Trace Route)</text:h>
      <text:list xml:id="list2911005086" text:style-name="L7">
        <text:list-item>
          <text:p text:style-name="P15"><text:span text:style-name="T2">Purpose:</text:span> Displays the route (path) and measures transit delays of packets across an IP network.</text:p>
        </text:list-item>
        <text:list-item>
          <text:p text:style-name="P15"><text:span text:style-name="T2">Observation Focus:</text:span> Each numbered line represents a "hop" (a router) between your computer and the target destination. If you see asterisks (<text:span text:style-name="Source_20_Text">* * *</text:span>), it means that specific router is configured to drop diagnostic ICMP/UDP requests for security.</text:p>
        </text:list-item>
      </text:list>
      <text:p text:style-name="P2"><draw:frame draw:style-name="fr2" draw:name="Image10" text:anchor-type="char" svg:x="-0.169cm" svg:y="9.437cm" svg:width="15.275cm" svg:height="10.793cm" draw:z-index="9"><draw:image xlink:href="Pictures/10000001000002F800000219BC8511CBC7F44104.png" xlink:type="simple" xlink:show="embed" xlink:actuate="onLoad" draw:mime-type="image/png"/></draw:frame>• mtr</text:p>
      <text:p text:style-name="P2"><text:soft-page-break/><text:s/></text:p>
      <text:h text:style-name="P1" text:outline-level="3"><text:span text:style-name="Source_20_Text">mtr</text:span> (My Traceroute)</text:h>
      <text:list xml:id="list673814391" text:style-name="L8">
        <text:list-item>
          <text:p text:style-name="P16"><text:span text:style-name="T2">Purpose:</text:span> Combines the functionality of <text:span text:style-name="Source_20_Text">ping</text:span> and <text:span text:style-name="Source_20_Text">traceroute</text:span> into a continuous diagnostic tool.</text:p>
        </text:list-item>
        <text:list-item>
          <text:p text:style-name="P16"><text:span text:style-name="T2">Observation Focus:</text:span> The report mode prints out a summary table showing every hop along the path alongside real-time stats like <text:span text:style-name="T2">Loss%</text:span>, <text:span text:style-name="T2">Best</text:span>, <text:span text:style-name="T2">Avg</text:span>, and <text:span text:style-name="T2">Worst</text:span> latency timings, making it easy to isolate exactly which router is causing a bottleneck.</text:p>
        </text:list-item>
      </text:list>
      <text:p text:style-name="P2"/>
      <text:p text:style-name="P2">• curl</text:p>
      <text:p text:style-name="P2"><draw:frame draw:style-name="fr1" draw:name="Image11" text:anchor-type="char" svg:width="16.272cm" svg:height="7.117cm" draw:z-index="10"><draw:image xlink:href="Pictures/10000001000002670000010D85AA0FBD60FF7A74.png" xlink:type="simple" xlink:show="embed" xlink:actuate="onLoad" draw:mime-type="image/png"/></draw:frame></text:p>
      <text:h text:style-name="P1" text:outline-level="3"><text:span text:style-name="Source_20_Text">curl</text:span> (Client URL)</text:h>
      <text:list xml:id="list514465875" text:style-name="L9">
        <text:list-item>
          <text:p text:style-name="P17"><text:span text:style-name="T2">Purpose:</text:span> Transfers data to or from a server.</text:p>
        </text:list-item>
        <text:list-item>
          <text:p text:style-name="P18"><text:span text:style-name="T2">Observation Focus:</text:span> Using the <text:span text:style-name="Source_20_Text">-I</text:span> flag fetches only the HTTP response headers. Observe the <text:span text:style-name="T2">HTTP/2 200 OK</text:span> (or 301/302 Redirect) status code, the Server type, and cache configurations, proving successful application-layer communication.</text:p>
        </text:list-item>
      </text:list>
      <text:p text:style-name="P19">• wget</text:p>
      <text:p text:style-name="P2"><draw:frame draw:style-name="fr1" draw:name="Image12" text:anchor-type="char" svg:width="17cm" svg:height="5.985cm" draw:z-index="11"><draw:image xlink:href="Pictures/1000000100000379000001395D681CE0CB257B4A.png" xlink:type="simple" xlink:show="embed" xlink:actuate="onLoad" draw:mime-type="image/png"/></draw:frame><text:s/></text:p>
      <text:h text:style-name="P1" text:outline-level="3"><text:soft-page-break/><text:span text:style-name="Source_20_Text">wget</text:span> (World Wide Web Get)</text:h>
      <text:list xml:id="list1698810477" text:style-name="L10">
        <text:list-item>
          <text:p text:style-name="P20"><text:span text:style-name="T2">Purpose:</text:span> Non-interactive network downloader.</text:p>
        </text:list-item>
        <text:list-item>
          <text:p text:style-name="P20"><text:span text:style-name="T2">Observation Focus:</text:span> The <text:span text:style-name="Source_20_Text">--spider</text:span> flag verifies the remote file or page exists without downloading it. The output shows the connection handshake, HTTP request sent, and the remote server's response code.</text:p>
        </text:list-item>
      </text:list>
      <text:p text:style-name="P2"/>
      <text:p text:style-name="P2">• tracepath</text:p>
      <text:p text:style-name="P2"><draw:frame draw:style-name="fr1" draw:name="Image13" text:anchor-type="char" svg:width="17cm" svg:height="11.167cm" draw:z-index="12"><draw:image xlink:href="Pictures/10000001000002B0000001C4BBFD6E7037A1AD37.png" xlink:type="simple" xlink:show="embed" xlink:actuate="onLoad" draw:mime-type="image/png"/></draw:frame></text:p>
      <text:p text:style-name="P2"/>
      <text:h text:style-name="P1" text:outline-level="3"><text:span text:style-name="Source_20_Text">tracepath</text:span> (Trace Path)</text:h>
      <text:list xml:id="list1553034787" text:style-name="L11">
        <text:list-item>
          <text:p text:style-name="P21"><text:span text:style-name="T2">Purpose:</text:span> Traces the network path to a remote host, similar to traceroute, but maps the <text:span text:style-name="T2">MTU</text:span> (Maximum Transmission Unit).</text:p>
        </text:list-item>
        <text:list-item>
          <text:p text:style-name="P21"><text:span text:style-name="T2">Observation Focus:</text:span> It determines the path MTU size (usually 1500 bytes), highlighting whether packets are forcing fragmentation down the line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• nslookup</text:p>
      <text:p text:style-name="P2"><draw:frame draw:style-name="fr1" draw:name="Image14" text:anchor-type="char" svg:width="17cm" svg:height="11.167cm" draw:z-index="13"><draw:image xlink:href="Pictures/10000001000002B0000001C448F19DD0D82A6C9F.png" xlink:type="simple" xlink:show="embed" xlink:actuate="onLoad" draw:mime-type="image/png"/></draw:frame><text:s/></text:p>
      <text:h text:style-name="P1" text:outline-level="3"><text:span text:style-name="Source_20_Text">nslookup</text:span> (Name Server Lookup)</text:h>
      <text:list xml:id="list418730971" text:style-name="L12">
        <text:list-item>
          <text:p text:style-name="P22"><text:span text:style-name="T2">Purpose:</text:span> Queries internet name servers interactively or non-interactively.</text:p>
        </text:list-item>
        <text:list-item>
          <text:p text:style-name="P22"><text:span text:style-name="T2">Observation Focus:</text:span> Displays the IP address of the local DNS server used to resolve the query, followed by the "Non-authoritative answer" containing the IP addresses associated with the target domain.</text:p>
        </text:list-item>
      </text:list>
      <text:p text:style-name="P2"/>
      <text:p text:style-name="P2">• host</text:p>
      <text:p text:style-name="P2"><draw:frame draw:style-name="fr1" draw:name="Image15" text:anchor-type="char" svg:width="17cm" svg:height="6.38cm" draw:z-index="14"><draw:image xlink:href="Pictures/100000010000029A000000FA351DB8B58B211E42.png" xlink:type="simple" xlink:show="embed" xlink:actuate="onLoad" draw:mime-type="image/png"/></draw:frame><text:s/></text:p>
      <text:h text:style-name="P1" text:outline-level="3"><text:soft-page-break/><text:span text:style-name="Source_20_Text">host</text:span> (DNS Lookup Utility)</text:h>
      <text:list xml:id="list2559092834" text:style-name="L13">
        <text:list-item>
          <text:p text:style-name="P23"><text:span text:style-name="T2">Purpose:</text:span> A simple, concise utility for performing DNS lookups.</text:p>
        </text:list-item>
        <text:list-item>
          <text:p text:style-name="P23"><text:span text:style-name="T2">Observation Focus:</text:span> Provides a highly readable, short summary showing that the domain name translates directly to its corresponding IPv4 and IPv6 addresses, as well as its mail handling servers (MX records).</text:p>
        </text:list-item>
      </text:list>
      <text:p text:style-name="P2">• whois</text:p>
      <text:p text:style-name="P2"><draw:frame draw:style-name="fr1" draw:name="Image16" text:anchor-type="char" svg:width="17cm" svg:height="13.432cm" draw:z-index="15"><draw:image xlink:href="Pictures/100000010000032F00000284B40672328E841FA1.png" xlink:type="simple" xlink:show="embed" xlink:actuate="onLoad" draw:mime-type="image/png"/></draw:frame><text:s/></text:p>
      <text:h text:style-name="P1" text:outline-level="3"><text:span text:style-name="Source_20_Text">whois</text:span> (Domain Registry Lookup)</text:h>
      <text:section text:style-name="Sect1" text:name="model-response-message-contentr_1b4ea3bd326efc46">
        <text:list xml:id="list626322864" text:style-name="L14">
          <text:list-item>
            <text:p text:style-name="P24"><text:span text:style-name="T2">Purpose:</text:span> Queries databases that store the registered users or assignees of an internet resource.</text:p>
          </text:list-item>
          <text:list-item>
            <text:p text:style-name="P24"><text:soft-page-break/><text:span text:style-name="T2">Observation Focus:</text:span> Displays public ownership records of the domain, including the domain registrar, creation date, expiration date, and assigned administrative name servers.</text:p>
          </text:list-item>
        </text:list>
      </text:section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5T10:01:28.788767293</meta:creation-date>
    <dc:date>2026-06-25T12:07:51.762219064</dc:date>
    <meta:editing-duration>PT45M18S</meta:editing-duration>
    <meta:editing-cycles>5</meta:editing-cycles>
    <meta:generator>LibreOffice/7.3.7.2$Linux_X86_64 LibreOffice_project/30$Build-2</meta:generator>
    <meta:document-statistic meta:table-count="0" meta:image-count="16" meta:object-count="0" meta:page-count="13" meta:paragraph-count="80" meta:word-count="850" meta:character-count="5590" meta:non-whitespace-character-count="4801"/>
  </office:meta>
</office:document-meta>
</file>