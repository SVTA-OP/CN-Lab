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f839" officeooo:paragraph-rsid="0003f8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05c8fa" officeooo:paragraph-rsid="0005c8fa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f454" officeooo:paragraph-rsid="0006f454" style:font-weight-asian="bold" style:font-weight-complex="bold"/>
    </style:style>
    <style:style style:name="T1" style:family="text">
      <style:text-properties officeooo:rsid="000b81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 – Kalavakkam</text:p>
      <text:p text:style-name="P3">Computer Science and Engineering</text:p>
      <text:p text:style-name="P1">ICS1513 – Computer Networks Laboratory</text:p>
      <text:p text:style-name="P1"/>
      <text:p text:style-name="P1">Experiement 1 - </text:p>
      <text:p text:style-name="P1"/>
      <text:p text:style-name="P2">Saravana Senthilkumar – 3122247001057<text:tab/><text:tab/><text:tab/><text:tab/><text:tab/><text:tab/><text:tab/><text:tab/>25.06.202<text:span text:style-name="T1">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10:01:28.788767293</meta:creation-date>
    <dc:date>2026-06-25T11:33:49.330569640</dc:date>
    <meta:editing-duration>PT13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0" meta:character-count="180" meta:non-whitespace-character-count="154"/>
  </office:meta>
</office:document-meta>
</file>