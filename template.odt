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f839" officeooo:paragraph-rsid="0003f8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5c8fa" officeooo:paragraph-rsid="0005c8fa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 – Kalavakkam</text:p>
      <text:p text:style-name="P1">Chennai – 603110</text:p>
      <text:p text:style-name="P1">ICS1513 – Computer Networks Laboratory</text:p>
      <text:p text:style-name="P1"/>
      <text:p text:style-name="P1">Experiement 1 - </text:p>
      <text:p text:style-name="P1"/>
      <text:p text:style-name="P2">Saravana Senthilkumar – 3122247001057<text:tab/><text:tab/><text:tab/><text:tab/><text:tab/><text:tab/><text:tab/><text:tab/>25.06.202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0:01:28.788767293</meta:creation-date>
    <dc:date>2026-06-25T10:24:33.278177612</dc:date>
    <meta:editing-duration>PT12M54S</meta:editing-duration>
    <meta:editing-cycles>1</meta:editing-cycles>
    <meta:document-statistic meta:table-count="0" meta:image-count="0" meta:object-count="0" meta:page-count="1" meta:paragraph-count="5" meta:word-count="18" meta:character-count="164" meta:non-whitespace-character-count="139"/>
    <meta:generator>LibreOffice/7.3.7.2$Linux_X86_64 LibreOffice_project/30$Build-2</meta:generator>
  </office:meta>
</office:document-meta>
</file>